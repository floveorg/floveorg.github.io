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50000026467E7D2EFABD42E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Typewriter" svg:font-family="MathJax_Typewriter" style:font-family-generic="moder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athJax_Typewriter" style:text-underline-style="none" fo:font-weight="bold" officeooo:rsid="001c6c90" officeooo:paragraph-rsid="001c6c9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MathJax_Typewriter" style:text-underline-style="none" fo:font-weight="bold" officeooo:rsid="001c6c90" officeooo:paragraph-rsid="001e49e4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MathJax_Typewriter" style:text-underline-style="none" fo:font-weight="bold" officeooo:rsid="001c6c90" officeooo:paragraph-rsid="001d62b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MathJax_Typewriter" style:text-underline-style="solid" style:text-underline-width="auto" style:text-underline-color="font-color" fo:font-weight="bold" officeooo:rsid="001c6c90" officeooo:paragraph-rsid="001c6c9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MathJax_Typewriter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MathJax_Typewriter" fo:font-size="10pt" officeooo:paragraph-rsid="00210956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MathJax_Typewriter" fo:font-size="10pt" officeooo:rsid="001f80be" officeooo:paragraph-rsid="0021095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MathJax_Typewriter" fo:font-size="10pt" officeooo:rsid="0008e15e" officeooo:paragraph-rsid="00210956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MathJax_Typewriter" fo:font-size="10pt" officeooo:rsid="00210956" officeooo:paragraph-rsid="00210956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MathJax_Typewriter" fo:font-size="24pt" style:text-underline-style="solid" style:text-underline-width="auto" style:text-underline-color="font-color" fo:font-weight="bold" officeooo:rsid="001c6c90" officeooo:paragraph-rsid="001e49e4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MathJax_Typewriter" fo:font-size="10pt" style:text-underline-style="solid" style:text-underline-width="auto" style:text-underline-color="font-color" fo:font-weight="bold" officeooo:rsid="001f80be" officeooo:paragraph-rsid="00210956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MathJax_Typewriter" fo:font-size="10pt" style:text-underline-style="solid" style:text-underline-width="auto" style:text-underline-color="font-color" fo:font-weight="bold" officeooo:rsid="001f80be" officeooo:paragraph-rsid="002c3e18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MathJax_Typewriter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MathJax_Typewriter" fo:font-size="10pt" officeooo:paragraph-rsid="00222134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MathJax_Typewriter" fo:font-size="10pt" officeooo:paragraph-rsid="00239087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MathJax_Typewriter" fo:font-size="10pt" officeooo:paragraph-rsid="002444ac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MathJax_Typewriter" fo:font-size="10pt" officeooo:paragraph-rsid="00260633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MathJax_Typewriter" fo:font-size="10pt" officeooo:paragraph-rsid="0029bf74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MathJax_Typewriter" fo:font-size="10pt" officeooo:paragraph-rsid="002b093c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MathJax_Typewriter" fo:font-size="10pt" officeooo:paragraph-rsid="00210956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MathJax_Typewriter" fo:font-size="10pt" officeooo:paragraph-rsid="002ceeec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MathJax_Typewriter" fo:font-size="10pt" officeooo:paragraph-rsid="002d878a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MathJax_Typewriter" fo:font-size="10pt" officeooo:paragraph-rsid="002f354d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MathJax_Typewriter" fo:font-size="10pt" officeooo:rsid="00222134" officeooo:paragraph-rsid="00222134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MathJax_Typewriter" fo:font-size="10pt" officeooo:rsid="00239087" officeooo:paragraph-rsid="00239087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MathJax_Typewriter" fo:font-size="10pt" officeooo:rsid="002444ac" officeooo:paragraph-rsid="002444ac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MathJax_Typewriter" fo:font-size="10pt" officeooo:paragraph-rsid="00260633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MathJax_Typewriter" fo:font-size="10pt" officeooo:paragraph-rsid="0029bf74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MathJax_Typewriter" fo:font-size="10pt" officeooo:paragraph-rsid="002d878a" style:font-size-asian="10pt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MathJax_Typewriter" fo:font-size="10pt" officeooo:paragraph-rsid="002f354d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MathJax_Typewriter" fo:font-size="10pt" officeooo:rsid="00260633" officeooo:paragraph-rsid="00260633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MathJax_Typewriter" fo:font-size="10pt" officeooo:rsid="00260633" officeooo:paragraph-rsid="002f354d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MathJax_Typewriter" fo:font-size="10pt" officeooo:rsid="001d62b1" officeooo:paragraph-rsid="002ceeec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MathJax_Typewriter" fo:font-size="10pt" officeooo:rsid="0029bf74" officeooo:paragraph-rsid="0029bf74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MathJax_Typewriter" fo:font-size="10pt" officeooo:rsid="0008e15e" officeooo:paragraph-rsid="002c3e18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MathJax_Typewriter" fo:font-size="10pt" officeooo:rsid="001f80be" officeooo:paragraph-rsid="00210956" style:font-size-asian="10pt" style:font-size-complex="10pt"/>
    </style:style>
    <style:style style:name="P37" style:family="paragraph" style:parent-style-name="Standard">
      <style:paragraph-properties fo:text-align="center" style:justify-single-word="false"/>
      <style:text-properties style:font-name="MathJax_Typewriter" fo:font-size="10pt" officeooo:rsid="001f80be" officeooo:paragraph-rsid="002c3e18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MathJax_Typewriter" fo:font-size="10pt" officeooo:rsid="00202317" officeooo:paragraph-rsid="00210956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MathJax_Typewriter" fo:font-size="10pt" officeooo:rsid="00210956" officeooo:paragraph-rsid="00210956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MathJax_Typewriter" fo:font-size="10pt" officeooo:rsid="00210956" officeooo:paragraph-rsid="002ceeec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MathJax_Typewriter" fo:font-size="10pt" officeooo:rsid="002d878a" officeooo:paragraph-rsid="002d878a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MathJax_Typewriter" fo:font-size="10pt" officeooo:rsid="002d878a" officeooo:paragraph-rsid="002d878a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MathJax_Typewriter" fo:font-size="10pt" officeooo:rsid="002d878a" officeooo:paragraph-rsid="002f354d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MathJax_Typewriter" fo:font-size="10pt" officeooo:rsid="002f354d" officeooo:paragraph-rsid="002f354d" style:font-size-asian="10pt" style:font-size-complex="10pt"/>
    </style:style>
    <style:style style:name="P45" style:family="paragraph" style:parent-style-name="Standard">
      <style:paragraph-properties fo:text-align="start" style:justify-single-word="false"/>
      <style:text-properties style:font-name="MathJax_Typewriter" fo:font-size="10pt" fo:font-weight="bold" officeooo:paragraph-rsid="001c6c90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MathJax_Typewriter" fo:font-size="10pt" fo:font-weight="bold" officeooo:paragraph-rsid="002b093c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MathJax_Typewriter" fo:font-size="10pt" style:text-underline-style="none" fo:font-weight="normal" officeooo:rsid="001f80be" officeooo:paragraph-rsid="002c3e18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MathJax_Typewriter" fo:font-size="10pt" style:text-underline-style="none" fo:font-weight="normal" officeooo:rsid="001f80be" officeooo:paragraph-rsid="002c3e18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MathJax_Typewriter" fo:font-size="12pt" style:text-underline-style="solid" style:text-underline-width="auto" style:text-underline-color="font-color" fo:font-weight="bold" officeooo:rsid="00222134" officeooo:paragraph-rsid="00222134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MathJax_Typewriter" fo:font-size="12pt" style:text-underline-style="solid" style:text-underline-width="auto" style:text-underline-color="font-color" fo:font-weight="bold" officeooo:rsid="00222134" officeooo:paragraph-rsid="00239087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MathJax_Typewriter" fo:font-size="12pt" style:text-underline-style="solid" style:text-underline-width="auto" style:text-underline-color="font-color" officeooo:rsid="002444ac" officeooo:paragraph-rsid="002444ac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MathJax_Typewriter" fo:font-size="12pt" style:text-underline-style="solid" style:text-underline-width="auto" style:text-underline-color="font-color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MathJax_Typewriter" fo:font-size="12pt" style:text-underline-style="solid" style:text-underline-width="auto" style:text-underline-color="font-color" officeooo:paragraph-rsid="002ceeec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MathJax_Typewriter" fo:font-size="12pt" style:text-underline-style="solid" style:text-underline-width="auto" style:text-underline-color="font-color" officeooo:rsid="00260633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MathJax_Typewriter" fo:font-size="12pt" officeooo:paragraph-rsid="002444ac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MathJax_Typewriter" fo:font-size="15pt" style:text-underline-style="solid" style:text-underline-width="auto" style:text-underline-color="font-color" style:font-size-asian="15pt" style:font-size-complex="15pt"/>
    </style:style>
    <style:style style:name="P57" style:family="paragraph" style:parent-style-name="Standard">
      <style:paragraph-properties fo:text-align="center" style:justify-single-word="false"/>
      <style:text-properties style:font-name="MathJax_Typewriter" fo:font-size="15pt" style:text-underline-style="solid" style:text-underline-width="auto" style:text-underline-color="font-color" officeooo:paragraph-rsid="002f354d" style:font-size-asian="15pt" style:font-size-complex="15pt"/>
    </style:style>
    <style:style style:name="P58" style:family="paragraph" style:parent-style-name="Standard">
      <style:paragraph-properties fo:text-align="center" style:justify-single-word="false"/>
      <style:text-properties style:font-name="MathJax_Typewriter" fo:font-size="15pt" officeooo:paragraph-rsid="00210956" style:font-size-asian="15pt" style:font-size-complex="15pt"/>
    </style:style>
    <style:style style:name="P59" style:family="paragraph" style:parent-style-name="Standard">
      <style:paragraph-properties fo:text-align="center" style:justify-single-word="false"/>
      <style:text-properties style:font-name="MathJax_Typewriter" fo:font-size="15pt" style:font-size-asian="15pt" style:font-size-complex="15pt"/>
    </style:style>
    <style:style style:name="P60" style:family="paragraph" style:parent-style-name="Standard">
      <style:paragraph-properties fo:text-align="center" style:justify-single-word="false"/>
      <style:text-properties style:font-name="MathJax_Typewriter" fo:font-size="20pt" style:text-underline-style="solid" style:text-underline-width="auto" style:text-underline-color="font-color" fo:font-weight="bold" officeooo:rsid="00222134" officeooo:paragraph-rsid="00222134" style:font-size-asian="20pt" style:font-weight-asian="bold" style:font-size-complex="20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MathJax_Typewriter" fo:font-size="8pt" style:text-underline-style="none" fo:font-weight="normal" officeooo:rsid="002f354d" officeooo:paragraph-rsid="002f354d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15pt" officeooo:paragraph-rsid="001c6c90" style:font-size-asian="15pt" style:font-size-complex="15pt"/>
    </style:style>
    <style:style style:name="T1" style:family="text">
      <style:text-properties officeooo:rsid="001c6c9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0956" style:font-weight-asian="bold" style:font-weight-complex="bold"/>
    </style:style>
    <style:style style:name="T4" style:family="text">
      <style:text-properties fo:font-weight="bold" officeooo:rsid="002444ac" style:font-weight-asian="bold" style:font-weight-complex="bold"/>
    </style:style>
    <style:style style:name="T5" style:family="text">
      <style:text-properties fo:font-weight="bold" officeooo:rsid="001c6c90" style:font-weight-asian="bold" style:font-weight-complex="bold"/>
    </style:style>
    <style:style style:name="T6" style:family="text">
      <style:text-properties fo:font-weight="bold" officeooo:rsid="00260633" style:font-weight-asian="bold" style:font-weight-complex="bold"/>
    </style:style>
    <style:style style:name="T7" style:family="text">
      <style:text-properties fo:font-weight="bold" officeooo:rsid="00281ccd" style:font-weight-asian="bold" style:font-weight-complex="bold"/>
    </style:style>
    <style:style style:name="T8" style:family="text">
      <style:text-properties fo:font-weight="bold" officeooo:rsid="0029bf74" style:font-weight-asian="bold" style:font-weight-complex="bold"/>
    </style:style>
    <style:style style:name="T9" style:family="text">
      <style:text-properties fo:font-weight="bold" officeooo:rsid="00239087" style:font-weight-asian="bold" style:font-weight-complex="bold"/>
    </style:style>
    <style:style style:name="T10" style:family="text">
      <style:text-properties fo:font-weight="bold" officeooo:rsid="002c3e18" style:font-weight-asian="bold" style:font-weight-complex="bold"/>
    </style:style>
    <style:style style:name="T11" style:family="text">
      <style:text-properties fo:font-weight="bold" officeooo:rsid="002d878a" style:font-weight-asian="bold" style:font-weight-complex="bold"/>
    </style:style>
    <style:style style:name="T12" style:family="text">
      <style:text-properties fo:font-weight="bold" officeooo:rsid="003083ff" style:font-weight-asian="bold" style:font-weight-complex="bold"/>
    </style:style>
    <style:style style:name="T13" style:family="text">
      <style:text-properties fo:font-weight="bold" officeooo:rsid="001eb78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10956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444ac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2ceeec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078056"/>
    </style:style>
    <style:style style:name="T20" style:family="text">
      <style:text-properties style:text-underline-style="solid" style:text-underline-width="auto" style:text-underline-color="font-color" officeooo:rsid="00210956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officeooo:rsid="0029bf74" style:font-size-asian="8pt" style:font-size-complex="8pt"/>
    </style:style>
    <style:style style:name="T23" style:family="text">
      <style:text-properties fo:font-size="8pt" officeooo:rsid="002d878a" style:font-size-asian="8pt" style:font-size-complex="8pt"/>
    </style:style>
    <style:style style:name="T24" style:family="text">
      <style:text-properties officeooo:rsid="001c9e69"/>
    </style:style>
    <style:style style:name="T25" style:family="text">
      <style:text-properties officeooo:rsid="001d62b1"/>
    </style:style>
    <style:style style:name="T26" style:family="text">
      <style:text-properties style:font-name="MathJax_Typewriter" style:text-underline-style="solid" style:text-underline-width="auto" style:text-underline-color="font-color" fo:font-weight="bold" officeooo:rsid="00239087" style:font-weight-asian="bold" style:font-weight-complex="bold"/>
    </style:style>
    <style:style style:name="T27" style:family="text">
      <style:text-properties style:font-name="MathJax_Typewriter" fo:font-size="10pt" fo:font-weight="bold" style:font-size-asian="10pt" style:font-weight-asian="bold" style:font-size-complex="10pt" style:font-weight-complex="bold"/>
    </style:style>
    <style:style style:name="T28" style:family="text">
      <style:text-properties officeooo:rsid="001eb78d"/>
    </style:style>
    <style:style style:name="T29" style:family="text">
      <style:text-properties officeooo:rsid="001f80be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officeooo:rsid="00210956" style:font-weight-asian="bold" style:font-weight-complex="bold"/>
    </style:style>
    <style:style style:name="T32" style:family="text">
      <style:text-properties officeooo:rsid="00078056"/>
    </style:style>
    <style:style style:name="T33" style:family="text">
      <style:text-properties officeooo:rsid="00210956"/>
    </style:style>
    <style:style style:name="T34" style:family="text">
      <style:text-properties officeooo:rsid="0008e15e"/>
    </style:style>
    <style:style style:name="T35" style:family="text">
      <style:text-properties officeooo:rsid="00222134"/>
    </style:style>
    <style:style style:name="T36" style:family="text">
      <style:text-properties officeooo:rsid="00239087"/>
    </style:style>
    <style:style style:name="T37" style:family="text">
      <style:text-properties officeooo:rsid="002444ac"/>
    </style:style>
    <style:style style:name="T38" style:family="text">
      <style:text-properties officeooo:rsid="00260633"/>
    </style:style>
    <style:style style:name="T39" style:family="text">
      <style:text-properties officeooo:rsid="00272dbc"/>
    </style:style>
    <style:style style:name="T40" style:family="text">
      <style:text-properties officeooo:rsid="00281ccd"/>
    </style:style>
    <style:style style:name="T41" style:family="text">
      <style:text-properties officeooo:rsid="0029bf74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29bf74" style:font-size-asian="12pt" style:font-weight-asian="bold" style:font-size-complex="12pt" style:font-weight-complex="bold"/>
    </style:style>
    <style:style style:name="T44" style:family="text">
      <style:text-properties officeooo:rsid="002b093c"/>
    </style:style>
    <style:style style:name="T45" style:family="text">
      <style:text-properties officeooo:rsid="002c3e18"/>
    </style:style>
    <style:style style:name="T46" style:family="text">
      <style:text-properties officeooo:rsid="002ceeec"/>
    </style:style>
    <style:style style:name="T47" style:family="text">
      <style:text-properties officeooo:rsid="002d878a"/>
    </style:style>
    <style:style style:name="T48" style:family="text">
      <style:text-properties officeooo:rsid="002f35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"/></text:p>
      <text:p text:style-name="P10">Keys of Everything</text:p>
      <text:p text:style-name="P1"/>
      <text:p text:style-name="P1"><draw:frame draw:style-name="fr1" draw:name="Imagen1" text:anchor-type="char" svg:x="2.932cm" svg:y="0.058cm" svg:width="2.14cm" svg:height="2.852cm" draw:z-index="0"><draw:image xlink:href="Pictures/10000001000001950000026467E7D2EFABD42E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4">The c</text:span>omplex <text:span text:style-name="T24">whole</text:span> <text:span text:style-name="T24">made</text:span> <text:span text:style-name="T24">easy</text:span></text:p>
      <text:p text:style-name="P1"/>
      <text:p text:style-name="P1"/>
      <text:p text:style-name="P1"/>
      <text:p text:style-name="P1"><text:span text:style-name="T25">Get </text:span>joy with the calm of order </text:p>
      <text:p text:style-name="P1"/>
      <text:p text:style-name="P1">and the thrill of imagination.</text:p>
      <text:p text:style-name="P1"/>
      <text:p text:style-name="P1"/>
      <text:p text:style-name="P1"/>
      <text:p text:style-name="P1"><text:span text:style-name="T24">Perform</text:span> <text:span text:style-name="T35">some</text:span> keywords <text:span text:style-name="T35">here...</text:span> </text:p>
      <text:p text:style-name="P1"/>
      <text:p text:style-name="P3"><text:s text:c="8"/><text:span text:style-name="T21">flove.org/games</text:span></text:p>
      <text:p text:style-name="P4"/>
      <text:p text:style-name="P4"><text:soft-page-break/></text:p>
      <text:p text:style-name="P62"><text:span text:style-name="T26">GUIDE</text:span></text:p>
      <text:p text:style-name="P4"/>
      <text:p text:style-name="P14"/>
      <text:p text:style-name="P14"/>
      <text:p text:style-name="P14">Play <text:span text:style-name="T35">it alone <text:s text:c="21"/></text:span></text:p>
      <text:p text:style-name="P14"/>
      <text:p text:style-name="P14"/>
      <text:p text:style-name="P14"/>
      <text:p text:style-name="P14"><text:span text:style-name="T35">Play it with more people</text:span></text:p>
      <text:p text:style-name="P24"/>
      <text:p text:style-name="P5"/>
      <text:p text:style-name="P5"/>
      <text:p text:style-name="P5"/>
      <text:p text:style-name="P24">LEVEL I: <text:s text:c="4"/>9 <text:s/>Cards <text:s/>(x2)</text:p>
      <text:p text:style-name="P5"/>
      <text:p text:style-name="P5"/>
      <text:p text:style-name="P24">LEVEL II: <text:s/>15 Cards (x2)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50"/>
      <text:p text:style-name="P50"><text:span text:style-name="T36">CHOOSE HOW TO START </text:span></text:p>
      <text:p text:style-name="P24"/>
      <text:p text:style-name="P24"/>
      <text:p text:style-name="P24"/>
      <text:p text:style-name="P24"><text:span text:style-name="T36">A. </text:span>Order all the Cards freely <text:span text:style-name="T36">and e</text:span>xplain why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B. Directly play our games, for more surprise 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text:soft-page-break/></text:p>
      <text:p text:style-name="P60">GAMES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7"><text:span text:style-name="T2">VOWS</text:span></text:p>
      <text:p text:style-name="P61">(Optional, Advanced)</text:p>
      <text:p text:style-name="P23"/>
      <text:p text:style-name="P23"/>
      <text:p text:style-name="P23"/>
      <text:p text:style-name="P30"><text:s/>Get 1 <text:span text:style-name="T47">C</text:span>ard <text:span text:style-name="T47">randomly </text:span>and <text:span text:style-name="T47">get</text:span> </text:p>
      <text:p text:style-name="P30"/>
      <text:p text:style-name="P22"/>
      <text:p text:style-name="P22"><text:s/></text:p>
      <text:p text:style-name="P29"><text:span text:style-name="T11"><text:s/>Abstract <text:s text:c="27"/>Practical</text:span></text:p>
      <text:p text:style-name="P22"><text:span text:style-name="T25"><text:s text:c="8"/>V</text:span>ow it for a time <text:s text:c="8"/><text:span text:style-name="T47">Flove.org/</text:span><text:span text:style-name="T23">(write it here)</text:span></text:p>
      <text:p text:style-name="P22"><text:span text:style-name="T36"><text:s text:c="16"/></text:span></text:p>
      <text:p text:style-name="P5"/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6"><text:span text:style-name="T2">LINKS</text:span></text:p>
      <text:p text:style-name="P59"><text:span text:style-name="T2"/></text:p>
      <text:p text:style-name="P5"><text:span text:style-name="T47">1. Get 1 card &amp; e</text:span>xpress something related <text:span text:style-name="T47">to it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2"/>
      <text:p text:style-name="P5"><text:span text:style-name="T47">2. </text:span><text:span text:style-name="T36">Guess or </text:span>Rate the proposed <text:span text:style-name="T36">relation</text:span>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4"><text:span text:style-name="T2">More...</text:span></text:p>
      <text:p text:style-name="P43"/>
      <text:p text:style-name="P43">1.1. On the back, keep it covered</text:p>
      <text:p text:style-name="P23"/>
      <text:p text:style-name="P23"><text:span text:style-name="T47">1.2. Mix them, and try to guess its source word</text:span></text:p>
      <text:p text:style-name="P5"/>
      <text:p text:style-name="P5"/>
      <text:p text:style-name="P5"/>
      <text:p text:style-name="P5"><text:span text:style-name="T48">2.1 </text:span>Ask for custom Links (negatives, <text:span text:style-name="T36">acts...</text:span>)</text:p>
      <text:p text:style-name="P5"/>
      <text:p text:style-name="P5"/>
      <text:p text:style-name="P52"><text:soft-page-break/><text:span text:style-name="T2"/></text:p>
      <text:p text:style-name="P52"><text:span text:style-name="T2">RANKS</text:span></text:p>
      <text:p text:style-name="P54"><text:span text:style-name="T2"/></text:p>
      <text:p text:style-name="P32"><text:span text:style-name="T8">0. </text:span><text:span text:style-name="T12">Set up</text:span> (Optional, <text:span text:style-name="T40">Advanced</text:span>) </text:p>
      <text:p text:style-name="P31"/>
      <text:p text:style-name="P31">-Make <text:span text:style-name="T39">free and </text:span>3 or 5<text:span text:style-name="T40"> </text:span>groups of 3 <text:span text:style-name="T40">&amp; order them</text:span></text:p>
      <text:p text:style-name="P31"/>
      <text:p text:style-name="P17"><text:span text:style-name="T38">-Contrast it with </text:span><text:span text:style-name="T39">(</text:span><text:span text:style-name="T38">and reset it </text:span><text:span text:style-name="T39">to</text:span><text:span text:style-name="T40">)</text:span><text:span text:style-name="T39"> </text:span><text:span text:style-name="T38">default</text:span></text:p>
      <text:p text:style-name="P5"/>
      <text:p text:style-name="P5"/>
      <text:p text:style-name="P18"><text:span text:style-name="T8">1. </text:span><text:span text:style-name="T2">Make vertical lists of 3 </text:span><text:span text:style-name="T9">&amp; </text:span><text:span text:style-name="T2">Explain why 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8"><text:span text:style-name="T8">2. </text:span><text:span text:style-name="T4">Add Perspectives </text:span><text:span text:style-name="T22">(better with extra Decks)</text:span></text:p>
      <text:p text:style-name="P18"/>
      <text:p text:style-name="P18"><text:span text:style-name="T38">Order </text:span><text:span text:style-name="T41">the M</text:span><text:span text:style-name="T37">agic </text:span><text:span text:style-name="T41">C</text:span><text:span text:style-name="T37">ards </text:span><text:span text:style-name="T41">along your play </text:span></text:p>
      <text:p text:style-name="P18"/>
      <text:p text:style-name="P18"/>
      <text:p text:style-name="P16"/>
      <text:p text:style-name="P16"/>
      <text:p text:style-name="P16"/>
      <text:p text:style-name="P28"/>
      <text:p text:style-name="P28"/>
      <text:p text:style-name="P46"><text:span text:style-name="T44">3. </text:span><text:span text:style-name="T38">Contrast Perspectives &amp; </text:span>Relate 1s, 2s and 3s</text:p>
      <text:p text:style-name="P34"><text:span text:style-name="T42"/></text:p>
      <text:p text:style-name="P34"><text:span text:style-name="T42"/></text:p>
      <text:p text:style-name="P19"><text:span text:style-name="T43">LEVEL II:</text:span><text:span text:style-name="T8">Add the Economy &amp; Questions triads</text:span></text:p>
      <text:p text:style-name="P15"><text:soft-page-break/></text:p>
      <text:p text:style-name="P17"><text:span text:style-name="T2"/></text:p>
      <text:p text:style-name="P55"><text:span text:style-name="T17">ADVANCED RANKS</text:span></text:p>
      <text:p text:style-name="P51"><text:span text:style-name="T2"/></text:p>
      <text:p text:style-name="P5"><text:span text:style-name="T2"/></text:p>
      <text:p text:style-name="P16"><text:span text:style-name="T2">LEVEL </text:span><text:span text:style-name="T4">I</text:span><text:span text:style-name="T2">II</text:span>: <text:span text:style-name="T2">BIOLOGY</text:span>: 4x5s &amp; 2x5 plus 1</text:p>
      <text:p text:style-name="P16"/>
      <text:p text:style-name="P16">-<text:span text:style-name="T44">Order the </text:span><text:span text:style-name="T37">5 </text:span><text:span text:style-name="T44">S</text:span><text:span text:style-name="T37">enses as square vertexes &amp; center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/>
      <text:p text:style-name="P26"/>
      <text:p text:style-name="P26">-<text:span text:style-name="T44">Order </text:span>5 <text:span text:style-name="T44">linear </text:span>pairs of Systems <text:span text:style-name="T44">with</text:span> centro<text:span text:style-name="T44">id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-<text:span text:style-name="T37">Analogize </text:span><text:span text:style-name="T44">the </text:span><text:span text:style-name="T37">5 senses to </text:span><text:span text:style-name="T44">the </text:span><text:span text:style-name="T37">5 systems pairs</text:span></text:p>
      <text:p text:style-name="P16"/>
      <text:p text:style-name="P16"/>
      <text:p text:style-name="P16"><text:soft-page-break/></text:p>
      <text:p text:style-name="P16"><text:s text:c="2"/></text:p>
      <text:p text:style-name="P5"><text:span text:style-name="T2">LEVEL I</text:span><text:span text:style-name="T4">V</text:span>:<text:span text:style-name="T2"> META</text:span><text:span text:style-name="T4">PHYSICS</text:span><text:span text:style-name="T2">, SCIENCES &amp; PS</text:span><text:span text:style-name="T13">Y</text:span><text:span text:style-name="T2">CO</text:span><text:span text:style-name="T12">SOCIAL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6"><text:span text:style-name="T2"/></text:p>
      <text:p text:style-name="P56"><text:span text:style-name="T2">SOULS</text:span></text:p>
      <text:p text:style-name="P5"/>
      <text:p text:style-name="P5"/>
      <text:p text:style-name="P17"><text:span text:style-name="T38">1. ADD</text:span> an </text:p>
      <text:p text:style-name="P17"><text:span text:style-name="T5"/></text:p>
      <text:p text:style-name="P27"><text:span text:style-name="T5">A</text:span><text:span text:style-name="T2">nimal <text:s text:c="13"/></text:span><text:span text:style-name="T6">&amp; <text:s text:c="11"/></text:span><text:span text:style-name="T2"><text:s/></text:span><text:span text:style-name="T5">C</text:span><text:span text:style-name="T2">olour</text:span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5"/>
      <text:p text:style-name="P5"/>
      <text:p text:style-name="P5"/>
      <text:p text:style-name="P31">2. ADD</text:p>
      <text:p text:style-name="P31"/>
      <text:p text:style-name="P17"><text:s/></text:p>
      <text:p text:style-name="P27">- <text:s text:c="34"/>-</text:p>
      <text:p text:style-name="P27"/>
      <text:p text:style-name="P27">- <text:s text:c="34"/>-</text:p>
      <text:p text:style-name="P27"/>
      <text:p text:style-name="P27">- <text:s text:c="34"/>-</text:p>
      <text:p text:style-name="P17"><text:s text:c="15"/></text:p>
      <text:p text:style-name="P27">3 <text:span text:style-name="T1">A</text:span>djectives of each </text:p>
      <text:p text:style-name="P27"/>
      <text:p text:style-name="P41">[OFFERS <text:s text:c="22"/>WANTS]</text:p>
      <text:p text:style-name="P41"/>
      <text:p text:style-name="P35"><text:span text:style-name="T45"><text:s/>[</text:span>1 <text:span text:style-name="T33">AM, </text:span>2 <text:span text:style-name="T33">GET, </text:span>3 PRO<text:span text:style-name="T33">J</text:span>ECT<text:span text:style-name="T45">]</text:span></text:p>
      <text:p text:style-name="P5"/>
      <text:p text:style-name="P5"/>
      <text:p text:style-name="P5"/>
      <text:p text:style-name="P5"><text:span text:style-name="T38">3. </text:span><text:span text:style-name="T45">A</text:span>dd <text:span text:style-name="T38">an </text:span>older <text:span text:style-name="T1">A</text:span>ncestor &amp; <text:span text:style-name="T1">S</text:span>ense &amp; 3 <text:span text:style-name="T1">A</text:span>djectives</text:p>
      <text:p text:style-name="P45"><text:soft-page-break/></text:p>
      <text:p text:style-name="P58"><text:span text:style-name="T18">MAGIC CARDS hints</text:span></text:p>
      <text:p text:style-name="P6"/>
      <text:p text:style-name="P6"><text:span text:style-name="T3">LINKS</text:span><text:span text:style-name="T29">: </text:span><text:span text:style-name="T33">Words related because of what logic?</text:span></text:p>
      <text:p text:style-name="P6"/>
      <text:p text:style-name="P6"/>
      <text:p text:style-name="P7"><text:span text:style-name="T2">RA</text:span><text:span text:style-name="T3">NKS</text:span>: <text:span text:style-name="T33">Order them vertically because of what?</text:span></text:p>
      <text:p text:style-name="P37"/>
      <text:p text:style-name="P7"/>
      <text:p text:style-name="P7"><text:span text:style-name="T14">MOM</text:span><text:span text:style-name="T20">M</text:span><text:span text:style-name="T14">ENTUAL SUBJE</text:span><text:span text:style-name="T20">C</text:span><text:span text:style-name="T14">TIV</text:span><text:span text:style-name="T20">E</text:span>, <text:span text:style-name="T14">GENERAL SUBJE</text:span><text:span text:style-name="T20">C</text:span><text:span text:style-name="T14">TIV</text:span><text:span text:style-name="T20">E</text:span></text:p>
      <text:p text:style-name="P7"><text:s/></text:p>
      <text:p text:style-name="P7"><text:span text:style-name="T14">MO</text:span><text:span text:style-name="T20">M</text:span><text:span text:style-name="T14">MENTUAL OBJE</text:span><text:span text:style-name="T20">C</text:span><text:span text:style-name="T14">TIV</text:span><text:span text:style-name="T20">E</text:span>, <text:span text:style-name="T15">GENERAL OBJE</text:span><text:span text:style-name="T16">C</text:span><text:span text:style-name="T15">TIV</text:span><text:span text:style-name="T16">E</text:span><text:span text:style-name="T2">. </text:span><text:span text:style-name="T31">Help:</text:span></text:p>
      <text:p text:style-name="P7"><text:span text:style-name="T31"/></text:p>
      <text:p text:style-name="P12"/>
      <text:p text:style-name="P38">-<text:span text:style-name="T14">PAS</text:span><text:span text:style-name="T20">T</text:span>, <text:span text:style-name="T14">PRESENT</text:span>, <text:span text:style-name="T14">FUTUR</text:span><text:span text:style-name="T20">E</text:span> <text:span text:style-name="T33">with</text:span> <text:span text:style-name="T33">WHY, WHAT, HOW</text:span> <text:s/></text:p>
      <text:p text:style-name="P11"/>
      <text:p text:style-name="P11"/>
      <text:p text:style-name="P11"/>
      <text:p text:style-name="P47"><text:span text:style-name="T33">What does my proposed order mean? </text:span><text:span text:style-name="T10">Order:</text:span></text:p>
      <text:p text:style-name="P47"/>
      <text:p text:style-name="P48">-<text:span text:style-name="T14">MICRO</text:span>, <text:span text:style-name="T19">CONFLUENCIA</text:span><text:span text:style-name="T32">, </text:span><text:span text:style-name="T14">MACRO</text:span></text:p>
      <text:p text:style-name="P7"/>
      <text:p text:style-name="P7">-<text:span text:style-name="T14">TAO</text:span>, <text:span text:style-name="T14">YANG</text:span> (masculin<text:span text:style-name="T33">e</text:span>), <text:span text:style-name="T14">YIN</text:span> (femenin<text:span text:style-name="T33">e</text:span>)</text:p>
      <text:p text:style-name="P7"><text:span text:style-name="T30"/></text:p>
      <text:p text:style-name="P8"/>
      <text:p text:style-name="P8"><text:span text:style-name="T10">Furthermore</text:span></text:p>
      <text:p text:style-name="P9"><text:span text:style-name="T45">R</text:span>ecord the games, PROSODY <text:span text:style-name="T45">is more key than word</text:span><text:span text:style-name="T46">s</text:span></text:p>
      <text:p text:style-name="P9"/>
      <text:p text:style-name="P40">All <text:span text:style-name="T46">pre-</text:span>imagined <text:span text:style-name="T45">objects </text:span>are <text:span text:style-name="T45">key</text:span>. <text:span text:style-name="T46">N</text:span><text:span text:style-name="T34">eutr</text:span>al or random adjectives tell about an introversion, but <text:span text:style-name="T46">point to</text:span> deeper <text:span text:style-name="T45">and more valueable </text:span>link<text:span text:style-name="T45">s</text:span>.</text:p>
      <text:p text:style-name="P40"/>
      <text:p text:style-name="P40"><text:soft-page-break/></text:p>
      <text:p text:style-name="P40"><text:s/></text:p>
      <text:p text:style-name="P53"><text:span text:style-name="T2">MORE </text:span><text:span text:style-name="T7">tricks</text:span> </text:p>
      <text:p text:style-name="P53"/>
      <text:p text:style-name="P21"/>
      <text:p text:style-name="P21"><text:span text:style-name="T38">-</text:span><text:span text:style-name="T40">Play again &amp; </text:span><text:span text:style-name="T38">C</text:span><text:span text:style-name="T28">ontrast</text:span> <text:span text:style-name="T28">the plays</text:span></text:p>
      <text:p text:style-name="P21"/>
      <text:p text:style-name="P21"/>
      <text:p text:style-name="P21"/>
      <text:p text:style-name="P33">-Define by (accumulatuve) images, gestures...</text:p>
      <text:p text:style-name="P21"/>
      <text:p text:style-name="P21"/>
      <text:p text:style-name="P21"/>
      <text:p text:style-name="P21"><text:span text:style-name="T1">-</text:span><text:span text:style-name="T40">C</text:span><text:span text:style-name="T1">ouple </text:span><text:span text:style-name="T40">cards &amp; define them with wise.flove.org</text:span></text:p>
      <text:p text:style-name="P33"/>
      <text:p text:style-name="P33"/>
      <text:p text:style-name="P33"/>
      <text:p text:style-name="P33">-<text:span text:style-name="T44">Gamify it</text:span><text:span text:style-name="T41">: </text:span>G<text:span text:style-name="T1">ive points </text:span><text:span text:style-name="T40">&amp;</text:span><text:span text:style-name="T1"> </text:span><text:span text:style-name="T40">G</text:span>et<text:span text:style-name="T1"> </text:span><text:span text:style-name="T40">A</text:span>nalysis <text:span text:style-name="T44">(&amp; decks)</text:span></text:p>
      <text:p text:style-name="P33"/>
      <text:p text:style-name="P33"/>
      <text:p text:style-name="P33"/>
      <text:p text:style-name="P33">-<text:span text:style-name="T44">Share: Gift the deck &amp; Sell a pack for friends</text:span></text:p>
      <text:p text:style-name="P33"/>
      <text:p text:style-name="P33"/>
      <text:p text:style-name="P33"/>
      <text:p text:style-name="P21"><text:span text:style-name="T25">-</text:span><text:span text:style-name="T40">Play VOWS in apps at flove.org/(keyword) </text:span></text:p>
      <text:p text:style-name="P21"/>
      <text:p text:style-name="P21"/>
      <text:p text:style-name="P21"/>
      <text:p text:style-name="P21"><text:span text:style-name="T25">-</text:span><text:span text:style-name="T40">Create new triads &amp; Invent new</text:span> rules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Typewriter" svg:font-family="MathJax_Typewriter" style:font-family-generic="moder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Spotted_20_Gray" draw:display-name="Spotted Gray" draw:style="radial" draw:cx="50%" draw:cy="50%" draw:start-color="#b2b2b2" draw:end-color="#eeeeee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gradient" draw:fill-gradient-name="Spotted_20_Gray" draw:gradient-step-count="0"/>
      <style:paragraph-properties style:page-number="auto" fo:background-color="#d0d0d0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2cm" fo:margin-bottom="2cm" fo:margin-left="1.127cm" fo:margin-right="1.0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6:30:02.620791934</meta:creation-date>
    <dc:date>2025-09-05T13:33:41.311431083</dc:date>
    <meta:editing-duration>PT1H3M33S</meta:editing-duration>
    <meta:editing-cycles>11</meta:editing-cycles>
    <meta:generator>LibreOffice/7.3.7.2$Linux_X86_64 LibreOffice_project/30$Build-2</meta:generator>
    <meta:document-statistic meta:table-count="0" meta:image-count="1" meta:object-count="0" meta:page-count="11" meta:paragraph-count="81" meta:word-count="403" meta:character-count="2533" meta:non-whitespace-character-count="1916"/>
  </office:meta>
</office:document-meta>
</file>