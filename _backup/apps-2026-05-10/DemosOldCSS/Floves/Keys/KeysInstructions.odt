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2887F16C76F92F6B833.jpg" manifest:media-type="image/jpeg"/>
  <manifest:file-entry manifest:full-path="Pictures/1000000000000400000003F295536796B5E99A77.jpg" manifest:media-type="image/jpeg"/>
  <manifest:file-entry manifest:full-path="Pictures/1000000000000400000003F3A9427053073B3217.jpg" manifest:media-type="image/jpeg"/>
  <manifest:file-entry manifest:full-path="Pictures/10000000000004000000040009E64F95FCE6C2A6.jpg" manifest:media-type="image/jpeg"/>
  <manifest:file-entry manifest:full-path="Pictures/10000001000001950000026467E7D2EFABD42E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Typewriter" svg:font-family="MathJax_Typewriter" style:font-family-generic="moder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athJax_Typewriter" style:text-underline-style="none" fo:font-weight="bold" officeooo:rsid="001c6c90" officeooo:paragraph-rsid="001c6c9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MathJax_Typewriter" style:text-underline-style="none" fo:font-weight="bold" officeooo:rsid="001c6c90" officeooo:paragraph-rsid="001e49e4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MathJax_Typewriter" style:text-underline-style="none" fo:font-weight="bold" officeooo:rsid="001c6c90" officeooo:paragraph-rsid="001d62b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MathJax_Typewriter" style:text-underline-style="solid" style:text-underline-width="auto" style:text-underline-color="font-color" fo:font-weight="bold" officeooo:rsid="001c6c90" officeooo:paragraph-rsid="001c6c9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MathJax_Typewriter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MathJax_Typewriter" fo:font-size="10pt" officeooo:paragraph-rsid="00210956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MathJax_Typewriter" fo:font-size="10pt" officeooo:paragraph-rsid="00222134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MathJax_Typewriter" fo:font-size="10pt" officeooo:paragraph-rsid="00239087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MathJax_Typewriter" fo:font-size="10pt" officeooo:paragraph-rsid="002444ac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MathJax_Typewriter" fo:font-size="10pt" officeooo:paragraph-rsid="00260633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MathJax_Typewriter" fo:font-size="10pt" officeooo:paragraph-rsid="0029bf74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MathJax_Typewriter" fo:font-size="10pt" officeooo:paragraph-rsid="002b093c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MathJax_Typewriter" fo:font-size="10pt" officeooo:paragraph-rsid="002ceeec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MathJax_Typewriter" fo:font-size="10pt" officeooo:paragraph-rsid="002d878a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MathJax_Typewriter" fo:font-size="10pt" officeooo:paragraph-rsid="002f354d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MathJax_Typewriter" fo:font-size="10pt" officeooo:rsid="0008e15e" officeooo:paragraph-rsid="002c3e18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MathJax_Typewriter" fo:font-size="10pt" officeooo:rsid="00222134" officeooo:paragraph-rsid="00222134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MathJax_Typewriter" fo:font-size="10pt" officeooo:rsid="00239087" officeooo:paragraph-rsid="00239087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MathJax_Typewriter" fo:font-size="10pt" officeooo:rsid="00239087" officeooo:paragraph-rsid="002d878a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MathJax_Typewriter" fo:font-size="10pt" officeooo:rsid="002444ac" officeooo:paragraph-rsid="002444ac" style:font-size-asian="10pt" style:font-size-complex="10pt"/>
    </style:style>
    <style:style style:name="P21" style:family="paragraph" style:parent-style-name="Standard">
      <style:paragraph-properties fo:text-align="center" style:justify-single-word="false"/>
      <style:text-properties style:font-name="MathJax_Typewriter" fo:font-size="10pt" officeooo:paragraph-rsid="00260633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style:font-name="MathJax_Typewriter" fo:font-size="10pt" officeooo:paragraph-rsid="002f354d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MathJax_Typewriter" fo:font-size="10pt" officeooo:rsid="00260633" officeooo:paragraph-rsid="00260633" style:font-size-asian="10pt" style:font-size-complex="10pt"/>
    </style:style>
    <style:style style:name="P24" style:family="paragraph" style:parent-style-name="Standard">
      <style:paragraph-properties fo:text-align="center" style:justify-single-word="false"/>
      <style:text-properties style:font-name="MathJax_Typewriter" fo:font-size="10pt" officeooo:rsid="002d878a" officeooo:paragraph-rsid="002d878a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style:font-name="MathJax_Typewriter" fo:font-size="10pt" officeooo:rsid="002d878a" officeooo:paragraph-rsid="002d878a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style:font-name="MathJax_Typewriter" fo:font-size="10pt" officeooo:rsid="002d878a" officeooo:paragraph-rsid="002f354d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style:font-name="MathJax_Typewriter" fo:font-size="10pt" fo:font-weight="bold" officeooo:paragraph-rsid="002b093c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MathJax_Typewriter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MathJax_Typewriter" fo:font-size="10pt" fo:font-weight="bold" officeooo:paragraph-rsid="00260633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MathJax_Typewriter" fo:font-size="10pt" fo:font-weight="bold" officeooo:rsid="002d878a" officeooo:paragraph-rsid="002d878a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MathJax_Typewriter" fo:font-size="10pt" fo:font-weight="bold" officeooo:rsid="002f354d" officeooo:paragraph-rsid="002f354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MathJax_Typewriter" fo:font-size="10pt" fo:font-weight="bold" officeooo:rsid="001c6c90" officeooo:paragraph-rsid="00260633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MathJax_Typewriter" fo:font-size="24pt" style:text-underline-style="solid" style:text-underline-width="auto" style:text-underline-color="font-color" fo:font-weight="bold" officeooo:rsid="001c6c90" officeooo:paragraph-rsid="001e49e4" style:font-size-asian="24pt" style:font-weight-asian="bold" style:font-size-complex="24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MathJax_Typewriter" fo:font-size="12pt" style:text-underline-style="solid" style:text-underline-width="auto" style:text-underline-color="font-color" fo:font-weight="bold" officeooo:rsid="00239087" officeooo:paragraph-rsid="0031cb78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MathJax_Typewriter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MathJax_Typewriter" fo:font-size="8pt" style:text-underline-style="none" fo:font-weight="normal" officeooo:rsid="002f354d" officeooo:paragraph-rsid="002f354d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MathJax_Typewriter" fo:font-size="15pt" style:text-underline-style="solid" style:text-underline-width="auto" style:text-underline-color="font-color" fo:font-weight="bold" officeooo:rsid="00239087" officeooo:paragraph-rsid="001c6c90" style:font-size-asian="15pt" style:font-weight-asian="bold" style:font-size-complex="15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MathJax_Typewriter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MathJax_Typewriter" fo:font-size="15pt" style:text-underline-style="solid" style:text-underline-width="auto" style:text-underline-color="font-color" fo:font-weight="bold" officeooo:rsid="002ceeec" officeooo:paragraph-rsid="00210956" style:font-size-asian="15pt" style:font-weight-asian="bold" style:font-size-complex="15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MathJax_Typewriter" fo:font-size="15pt" fo:font-weight="bold" style:font-size-asian="15pt" style:font-weight-asian="bold" style:font-size-complex="15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MathJax_Typewriter" fo:font-size="10pt" officeooo:rsid="00222134" officeooo:paragraph-rsid="00222134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style:font-name="MathJax_Typewriter" fo:font-size="10pt" officeooo:paragraph-rsid="002f354d" style:font-size-asian="10pt" style:font-size-complex="10pt"/>
    </style:style>
    <style:style style:name="P43" style:family="paragraph" style:parent-style-name="Standard">
      <style:paragraph-properties fo:text-align="start" style:justify-single-word="false"/>
      <style:text-properties style:font-name="MathJax_Typewriter" fo:font-size="10pt" style:font-size-asian="10pt" style:font-size-complex="10pt"/>
    </style:style>
    <style:style style:name="P44" style:family="paragraph" style:parent-style-name="Standard">
      <style:paragraph-properties fo:text-align="start" style:justify-single-word="false"/>
      <style:text-properties style:font-name="MathJax_Typewriter" fo:font-size="10pt" officeooo:paragraph-rsid="0033654a" style:font-size-asian="10pt" style:font-size-complex="10pt"/>
    </style:style>
    <style:style style:name="P45" style:family="paragraph" style:parent-style-name="Standard">
      <style:paragraph-properties fo:text-align="start" style:justify-single-word="false"/>
      <style:text-properties style:font-name="MathJax_Typewriter" fo:font-size="10pt" officeooo:paragraph-rsid="002444ac" style:font-size-asian="10pt" style:font-size-complex="10pt"/>
    </style:style>
    <style:style style:name="P46" style:family="paragraph" style:parent-style-name="Standard">
      <style:paragraph-properties fo:text-align="start" style:justify-single-word="false"/>
      <style:text-properties style:font-name="MathJax_Typewriter" fo:font-size="10pt" officeooo:paragraph-rsid="00366047" style:font-size-asian="10pt" style:font-size-complex="10pt"/>
    </style:style>
    <style:style style:name="P47" style:family="paragraph" style:parent-style-name="Standard">
      <style:paragraph-properties fo:text-align="start" style:justify-single-word="false"/>
      <style:text-properties style:font-name="MathJax_Typewriter" fo:font-size="10pt" officeooo:paragraph-rsid="00210956" style:font-size-asian="10pt" style:font-size-complex="10pt"/>
    </style:style>
    <style:style style:name="P48" style:family="paragraph" style:parent-style-name="Standard">
      <style:paragraph-properties fo:text-align="start" style:justify-single-word="false"/>
      <style:text-properties style:font-name="MathJax_Typewriter" fo:font-size="10pt" officeooo:paragraph-rsid="002ceeec" style:font-size-asian="10pt" style:font-size-complex="10pt"/>
    </style:style>
    <style:style style:name="P49" style:family="paragraph" style:parent-style-name="Standard">
      <style:paragraph-properties fo:text-align="start" style:justify-single-word="false"/>
      <style:text-properties style:font-name="MathJax_Typewriter" fo:font-size="10pt" officeooo:paragraph-rsid="0029bf74" style:font-size-asian="10pt" style:font-size-complex="10pt"/>
    </style:style>
    <style:style style:name="P50" style:family="paragraph" style:parent-style-name="Standard">
      <style:paragraph-properties fo:text-align="start" style:justify-single-word="false"/>
      <style:text-properties style:font-name="MathJax_Typewriter" fo:font-size="10pt" officeooo:paragraph-rsid="003b2e86" style:font-size-asian="10pt" style:font-size-complex="10pt"/>
    </style:style>
    <style:style style:name="P51" style:family="paragraph" style:parent-style-name="Standard">
      <style:paragraph-properties fo:text-align="start" style:justify-single-word="false"/>
      <style:text-properties style:font-name="MathJax_Typewriter" fo:font-size="10pt" officeooo:paragraph-rsid="00239087" style:font-size-asian="10pt" style:font-size-complex="10pt"/>
    </style:style>
    <style:style style:name="P52" style:family="paragraph" style:parent-style-name="Standard">
      <style:paragraph-properties fo:text-align="start" style:justify-single-word="false"/>
      <style:text-properties style:font-name="MathJax_Typewriter" fo:font-size="10pt" officeooo:rsid="00260633" officeooo:paragraph-rsid="00260633" style:font-size-asian="10pt" style:font-size-complex="10pt"/>
    </style:style>
    <style:style style:name="P53" style:family="paragraph" style:parent-style-name="Standard">
      <style:paragraph-properties fo:text-align="center" style:justify-single-word="false"/>
      <style:text-properties style:font-name="MathJax_Typewriter" fo:font-size="10pt" officeooo:paragraph-rsid="00260633" style:font-size-asian="10pt" style:font-size-complex="10pt"/>
    </style:style>
    <style:style style:name="P54" style:family="paragraph" style:parent-style-name="Standard">
      <style:paragraph-properties fo:text-align="center" style:justify-single-word="false"/>
      <style:text-properties style:font-name="MathJax_Typewriter" fo:font-size="10pt" officeooo:paragraph-rsid="0040eeda" style:font-size-asian="10pt" style:font-size-complex="10pt"/>
    </style:style>
    <style:style style:name="P55" style:family="paragraph" style:parent-style-name="Standard">
      <style:paragraph-properties fo:text-align="start" style:justify-single-word="false"/>
      <style:text-properties style:font-name="MathJax_Typewriter" fo:font-size="10pt" officeooo:rsid="002444ac" officeooo:paragraph-rsid="002444ac" style:font-size-asian="10pt" style:font-size-complex="10pt"/>
    </style:style>
    <style:style style:name="P56" style:family="paragraph" style:parent-style-name="Standard">
      <style:paragraph-properties fo:text-align="start" style:justify-single-word="false"/>
      <style:text-properties style:font-name="MathJax_Typewriter" fo:font-size="10pt" officeooo:rsid="00346f77" officeooo:paragraph-rsid="00346f77" style:font-size-asian="10pt" style:font-size-complex="10pt"/>
    </style:style>
    <style:style style:name="P57" style:family="paragraph" style:parent-style-name="Standard">
      <style:paragraph-properties fo:text-align="start" style:justify-single-word="false"/>
      <style:text-properties style:font-name="MathJax_Typewriter" fo:font-size="10pt" officeooo:rsid="00366047" officeooo:paragraph-rsid="00366047" style:font-size-asian="10pt" style:font-size-complex="10pt"/>
    </style:style>
    <style:style style:name="P58" style:family="paragraph" style:parent-style-name="Standard">
      <style:paragraph-properties fo:text-align="start" style:justify-single-word="false"/>
      <style:text-properties style:font-name="MathJax_Typewriter" fo:font-size="10pt" officeooo:rsid="0037755d" officeooo:paragraph-rsid="0037755d" style:font-size-asian="10pt" style:font-size-complex="10pt"/>
    </style:style>
    <style:style style:name="P59" style:family="paragraph" style:parent-style-name="Standard">
      <style:paragraph-properties fo:text-align="start" style:justify-single-word="false"/>
      <style:text-properties style:font-name="MathJax_Typewriter" fo:font-size="10pt" officeooo:rsid="001f80be" officeooo:paragraph-rsid="00210956" style:font-size-asian="10pt" style:font-size-complex="10pt"/>
    </style:style>
    <style:style style:name="P60" style:family="paragraph" style:parent-style-name="Standard">
      <style:paragraph-properties fo:text-align="start" style:justify-single-word="false"/>
      <style:text-properties style:font-name="MathJax_Typewriter" fo:font-size="10pt" officeooo:rsid="001f80be" officeooo:paragraph-rsid="003955ce" style:font-size-asian="10pt" style:font-size-complex="10pt"/>
    </style:style>
    <style:style style:name="P61" style:family="paragraph" style:parent-style-name="Standard">
      <style:paragraph-properties fo:text-align="start" style:justify-single-word="false"/>
      <style:text-properties style:font-name="MathJax_Typewriter" fo:font-size="10pt" officeooo:rsid="003af2b8" officeooo:paragraph-rsid="003af2b8" style:font-size-asian="10pt" style:font-size-complex="10pt"/>
    </style:style>
    <style:style style:name="P62" style:family="paragraph" style:parent-style-name="Standard">
      <style:paragraph-properties fo:text-align="start" style:justify-single-word="false"/>
      <style:text-properties style:font-name="MathJax_Typewriter" fo:font-size="10pt" officeooo:rsid="003b2e86" officeooo:paragraph-rsid="003b2e86" style:font-size-asian="10pt" style:font-size-complex="10pt"/>
    </style:style>
    <style:style style:name="P63" style:family="paragraph" style:parent-style-name="Standard">
      <style:paragraph-properties fo:text-align="start" style:justify-single-word="false"/>
      <style:text-properties style:font-name="MathJax_Typewriter" fo:font-size="10pt" officeooo:rsid="003e90a8" officeooo:paragraph-rsid="003e90a8" style:font-size-asian="10pt" style:font-size-complex="10pt"/>
    </style:style>
    <style:style style:name="P64" style:family="paragraph" style:parent-style-name="Standard">
      <style:paragraph-properties fo:text-align="center" style:justify-single-word="false"/>
      <style:text-properties style:font-name="MathJax_Typewriter" fo:font-size="10pt" fo:font-weight="bold" officeooo:paragraph-rsid="002444ac" style:font-size-asian="10pt" style:font-weight-asian="bold" style:font-size-complex="10pt" style:font-weight-complex="bold"/>
    </style:style>
    <style:style style:name="P65" style:family="paragraph" style:parent-style-name="Standard">
      <style:paragraph-properties fo:text-align="center" style:justify-single-word="false"/>
      <style:text-properties style:font-name="MathJax_Typewriter" fo:font-size="10pt" fo:font-weight="bold" officeooo:rsid="002c3e18" officeooo:paragraph-rsid="002c3e18" style:font-size-asian="10pt" style:font-weight-asian="bold" style:font-size-complex="10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MathJax_Typewriter" fo:font-size="10pt" fo:font-weight="bold" officeooo:rsid="001f80be" officeooo:paragraph-rsid="003955ce" style:font-size-asian="10pt" style:font-weight-asian="bold" style:font-size-complex="10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MathJax_Typewriter" fo:font-size="10pt" fo:font-weight="bold" officeooo:paragraph-rsid="002b093c" style:font-size-asian="10pt" style:font-weight-asian="bold" style:font-size-complex="10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MathJax_Typewriter" fo:font-size="10pt" fo:font-weight="bold" style:font-size-asian="10pt" style:font-weight-asian="bold" style:font-size-complex="10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MathJax_Typewriter" fo:font-size="10pt" fo:font-weight="normal" officeooo:rsid="0037755d" officeooo:paragraph-rsid="0037755d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text-align="center" style:justify-single-word="false"/>
      <style:text-properties style:font-name="MathJax_Typewriter" fo:font-size="20pt" style:text-underline-style="solid" style:text-underline-width="auto" style:text-underline-color="font-color" fo:font-weight="bold" officeooo:rsid="00222134" officeooo:paragraph-rsid="00222134" style:font-size-asian="20pt" style:font-weight-asian="bold" style:font-size-complex="20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MathJax_Typewriter" fo:font-size="12pt" fo:font-weight="bold" officeooo:rsid="0029bf74" officeooo:paragraph-rsid="0029bf74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center" style:justify-single-word="false"/>
      <style:text-properties style:font-name="MathJax_Typewriter" fo:font-size="12pt" style:text-underline-style="solid" style:text-underline-width="auto" style:text-underline-color="font-color" fo:font-weight="bold" officeooo:rsid="001f80be" officeooo:paragraph-rsid="003955ce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center" style:justify-single-word="false"/>
      <style:text-properties style:font-name="MathJax_Typewriter" fo:font-size="12pt" style:text-underline-style="solid" style:text-underline-width="auto" style:text-underline-color="font-color" fo:font-weight="bold" officeooo:rsid="00222134" officeooo:paragraph-rsid="00222134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MathJax_Typewriter" fo:font-size="8pt" officeooo:rsid="00346f77" officeooo:paragraph-rsid="00346f77" style:font-size-asian="8pt" style:font-size-complex="8pt"/>
    </style:style>
    <style:style style:name="P75" style:family="paragraph" style:parent-style-name="Standard">
      <style:paragraph-properties fo:text-align="start" style:justify-single-word="false"/>
      <style:text-properties style:font-name="MathJax_Typewriter" fo:font-size="8pt" officeooo:rsid="0037755d" officeooo:paragraph-rsid="0037755d" style:font-size-asian="8pt" style:font-size-complex="8pt"/>
    </style:style>
    <style:style style:name="P76" style:family="paragraph" style:parent-style-name="Standard">
      <style:paragraph-properties fo:text-align="start" style:justify-single-word="false"/>
      <style:text-properties style:font-name="MathJax_Typewriter" fo:font-size="8pt" officeooo:rsid="003955ce" officeooo:paragraph-rsid="003955ce" style:font-size-asian="8pt" style:font-size-complex="8pt"/>
    </style:style>
    <style:style style:name="P77" style:family="paragraph" style:parent-style-name="Standard">
      <style:paragraph-properties fo:text-align="start" style:justify-single-word="false"/>
      <style:text-properties style:font-name="MathJax_Typewriter" fo:font-size="8pt" officeooo:rsid="003c6a47" officeooo:paragraph-rsid="003c6a47" style:font-size-asian="8pt" style:font-size-complex="8pt"/>
    </style:style>
    <style:style style:name="P78" style:family="paragraph" style:parent-style-name="Standard">
      <style:paragraph-properties fo:text-align="start" style:justify-single-word="false"/>
      <style:text-properties style:font-name="MathJax_Typewriter" fo:font-size="8pt" fo:font-weight="normal" officeooo:rsid="0037755d" officeooo:paragraph-rsid="0037755d" style:font-size-asian="8pt" style:font-weight-asian="normal" style:font-size-complex="8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MathJax_Typewriter" fo:font-size="8pt" fo:font-weight="bold" officeooo:rsid="003955ce" officeooo:paragraph-rsid="003955ce" style:font-size-asian="8pt" style:font-weight-asian="bold" style:font-size-complex="8pt" style:font-weight-complex="bold"/>
    </style:style>
    <style:style style:name="P80" style:family="paragraph" style:parent-style-name="Standard">
      <style:paragraph-properties fo:text-align="center" style:justify-single-word="false"/>
      <style:text-properties style:font-name="MathJax_Typewriter" fo:font-size="8pt" fo:font-style="italic" officeooo:rsid="003e90a8" officeooo:paragraph-rsid="003e90a8" style:font-size-asian="8pt" style:font-style-asian="italic" style:font-size-complex="8pt" style:font-style-complex="italic"/>
    </style:style>
    <style:style style:name="P81" style:family="paragraph" style:parent-style-name="Standard">
      <style:paragraph-properties fo:text-align="center" style:justify-single-word="false"/>
      <style:text-properties style:font-name="MathJax_Typewriter" fo:font-size="15pt" style:text-underline-style="solid" style:text-underline-width="auto" style:text-underline-color="font-color" officeooo:paragraph-rsid="00366047" style:font-size-asian="15pt" style:font-size-complex="15pt"/>
    </style:style>
    <style:style style:name="P82" style:family="paragraph" style:parent-style-name="Standard">
      <style:paragraph-properties fo:text-align="start" style:justify-single-word="false"/>
      <style:text-properties style:font-name="MathJax_Typewriter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MathJax_Typewriter" fo:font-size="15pt" style:text-underline-style="solid" style:text-underline-width="auto" style:text-underline-color="font-color" fo:font-weight="bold" officeooo:rsid="003c6a47" officeooo:paragraph-rsid="003955ce" style:font-size-asian="15pt" style:font-weight-asian="bold" style:font-size-complex="15pt" style:font-weight-complex="bold"/>
    </style:style>
    <style:style style:name="P84" style:family="paragraph" style:parent-style-name="Standard">
      <style:paragraph-properties fo:text-align="center" style:justify-single-word="false"/>
      <style:text-properties style:font-name="MathJax_Typewriter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85" style:family="paragraph" style:parent-style-name="Standard">
      <style:paragraph-properties fo:text-align="center" style:justify-single-word="false"/>
      <style:text-properties style:font-name="MathJax_Typewriter" fo:font-size="15pt" style:text-underline-style="solid" style:text-underline-width="auto" style:text-underline-color="font-color" fo:font-weight="bold" officeooo:paragraph-rsid="002f354d" style:font-size-asian="15pt" style:font-weight-asian="bold" style:font-size-complex="15pt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MathJax_Typewriter" fo:font-size="15pt" style:text-underline-style="solid" style:text-underline-width="auto" style:text-underline-color="font-color" fo:font-weight="bold" officeooo:rsid="002444ac" officeooo:paragraph-rsid="002444ac" style:font-size-asian="15pt" style:font-weight-asian="bold" style:font-size-complex="15pt" style:font-weight-complex="bold"/>
    </style:style>
    <style:style style:name="T1" style:family="text">
      <style:text-properties officeooo:rsid="001c6c9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0956" style:font-weight-asian="bold" style:font-weight-complex="bold"/>
    </style:style>
    <style:style style:name="T4" style:family="text">
      <style:text-properties fo:font-weight="bold" officeooo:rsid="002444ac" style:font-weight-asian="bold" style:font-weight-complex="bold"/>
    </style:style>
    <style:style style:name="T5" style:family="text">
      <style:text-properties fo:font-weight="bold" officeooo:rsid="001c6c90" style:font-weight-asian="bold" style:font-weight-complex="bold"/>
    </style:style>
    <style:style style:name="T6" style:family="text">
      <style:text-properties fo:font-weight="bold" officeooo:rsid="00260633" style:font-weight-asian="bold" style:font-weight-complex="bold"/>
    </style:style>
    <style:style style:name="T7" style:family="text">
      <style:text-properties fo:font-weight="bold" officeooo:rsid="0029bf74" style:font-weight-asian="bold" style:font-weight-complex="bold"/>
    </style:style>
    <style:style style:name="T8" style:family="text">
      <style:text-properties fo:font-weight="bold" officeooo:rsid="00239087" style:font-weight-asian="bold" style:font-weight-complex="bold"/>
    </style:style>
    <style:style style:name="T9" style:family="text">
      <style:text-properties fo:font-weight="bold" officeooo:rsid="003083ff" style:font-weight-asian="bold" style:font-weight-complex="bold"/>
    </style:style>
    <style:style style:name="T10" style:family="text">
      <style:text-properties fo:font-weight="bold" officeooo:rsid="001eb78d" style:font-weight-asian="bold" style:font-weight-complex="bold"/>
    </style:style>
    <style:style style:name="T11" style:family="text">
      <style:text-properties fo:font-weight="bold" officeooo:rsid="0033654a" style:font-weight-asian="bold" style:font-weight-complex="bold"/>
    </style:style>
    <style:style style:name="T12" style:family="text">
      <style:text-properties fo:font-weight="bold" officeooo:rsid="00366047" style:font-weight-asian="bold" style:font-weight-complex="bold"/>
    </style:style>
    <style:style style:name="T13" style:family="text">
      <style:text-properties fo:font-weight="bold" officeooo:rsid="003955ce" style:font-weight-asian="bold" style:font-weight-complex="bold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29bf74" style:font-size-asian="8pt" style:font-size-complex="8pt"/>
    </style:style>
    <style:style style:name="T16" style:family="text">
      <style:text-properties fo:font-size="8pt" officeooo:rsid="002d878a" style:font-size-asian="8pt" style:font-size-complex="8pt"/>
    </style:style>
    <style:style style:name="T17" style:family="text">
      <style:text-properties officeooo:rsid="001c9e69"/>
    </style:style>
    <style:style style:name="T18" style:family="text">
      <style:text-properties officeooo:rsid="001d62b1"/>
    </style:style>
    <style:style style:name="T19" style:family="text">
      <style:text-properties officeooo:rsid="001eb78d"/>
    </style:style>
    <style:style style:name="T20" style:family="text">
      <style:text-properties officeooo:rsid="001f80be"/>
    </style:style>
    <style:style style:name="T21" style:family="text">
      <style:text-properties style:text-underline-style="none"/>
    </style:style>
    <style:style style:name="T22" style:family="text">
      <style:text-properties officeooo:rsid="00210956"/>
    </style:style>
    <style:style style:name="T23" style:family="text">
      <style:text-properties officeooo:rsid="00222134"/>
    </style:style>
    <style:style style:name="T24" style:family="text">
      <style:text-properties officeooo:rsid="00239087"/>
    </style:style>
    <style:style style:name="T25" style:family="text">
      <style:text-properties officeooo:rsid="002444ac"/>
    </style:style>
    <style:style style:name="T26" style:family="text">
      <style:text-properties officeooo:rsid="00260633"/>
    </style:style>
    <style:style style:name="T27" style:family="text">
      <style:text-properties officeooo:rsid="00281ccd"/>
    </style:style>
    <style:style style:name="T28" style:family="text">
      <style:text-properties officeooo:rsid="0029bf74"/>
    </style:style>
    <style:style style:name="T29" style:family="text">
      <style:text-properties fo:font-size="12pt" fo:font-weight="bold" officeooo:rsid="0029bf74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3b2e86" style:font-size-asian="12pt" style:font-weight-asian="bold" style:font-size-complex="12pt" style:font-weight-complex="bold"/>
    </style:style>
    <style:style style:name="T31" style:family="text">
      <style:text-properties officeooo:rsid="002b093c"/>
    </style:style>
    <style:style style:name="T32" style:family="text">
      <style:text-properties officeooo:rsid="002c3e18"/>
    </style:style>
    <style:style style:name="T33" style:family="text">
      <style:text-properties officeooo:rsid="002ceeec"/>
    </style:style>
    <style:style style:name="T34" style:family="text">
      <style:text-properties officeooo:rsid="002d878a"/>
    </style:style>
    <style:style style:name="T35" style:family="text">
      <style:text-properties officeooo:rsid="002f354d"/>
    </style:style>
    <style:style style:name="T36" style:family="text">
      <style:text-properties officeooo:rsid="0031cb78"/>
    </style:style>
    <style:style style:name="T37" style:family="text">
      <style:text-properties officeooo:rsid="0033654a"/>
    </style:style>
    <style:style style:name="T38" style:family="text">
      <style:text-properties officeooo:rsid="00346f77"/>
    </style:style>
    <style:style style:name="T39" style:family="text">
      <style:text-properties officeooo:rsid="00366047"/>
    </style:style>
    <style:style style:name="T40" style:family="text">
      <style:text-properties officeooo:rsid="0037755d"/>
    </style:style>
    <style:style style:name="T41" style:family="text">
      <style:text-properties officeooo:rsid="003083ff"/>
    </style:style>
    <style:style style:name="T42" style:family="text">
      <style:text-properties officeooo:rsid="003955ce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3955ce" style:font-weight-asian="normal" style:font-weight-complex="normal"/>
    </style:style>
    <style:style style:name="T45" style:family="text">
      <style:text-properties fo:font-weight="normal" officeooo:rsid="00210956" style:font-weight-asian="normal" style:font-weight-complex="normal"/>
    </style:style>
    <style:style style:name="T46" style:family="text">
      <style:text-properties officeooo:rsid="003b2e86"/>
    </style:style>
    <style:style style:name="T47" style:family="text">
      <style:text-properties officeooo:rsid="004012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3"/></text:p>
      <text:p text:style-name="P33">Keys of Everything</text:p>
      <text:p text:style-name="P1"/>
      <text:p text:style-name="P1"><draw:frame draw:style-name="fr1" draw:name="Imagen1" text:anchor-type="char" svg:x="2.932cm" svg:y="0.058cm" svg:width="2.14cm" svg:height="2.852cm" draw:z-index="0"><draw:image xlink:href="Pictures/10000001000001950000026467E7D2EFABD42E3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7">The c</text:span>omplex <text:span text:style-name="T17">whole</text:span> <text:span text:style-name="T17">made</text:span> <text:span text:style-name="T17">easy</text:span></text:p>
      <text:p text:style-name="P1"/>
      <text:p text:style-name="P1"/>
      <text:p text:style-name="P1"/>
      <text:p text:style-name="P1"><text:span text:style-name="T18">Get </text:span>joy with the calm of order </text:p>
      <text:p text:style-name="P1"/>
      <text:p text:style-name="P1">and the thrill of imagination.</text:p>
      <text:p text:style-name="P1"/>
      <text:p text:style-name="P1"/>
      <text:p text:style-name="P1"/>
      <text:p text:style-name="P1"><text:span text:style-name="T17">Perform</text:span> <text:span text:style-name="T23">some</text:span> keywords <text:span text:style-name="T23">here...</text:span> </text:p>
      <text:p text:style-name="P1"/>
      <text:p text:style-name="P3"><text:s text:c="8"/><text:span text:style-name="T14">flove.org/games</text:span></text:p>
      <text:p text:style-name="P4"/>
      <text:p text:style-name="P4"><text:soft-page-break/></text:p>
      <text:p text:style-name="P37">GUIDE</text:p>
      <text:p text:style-name="P4"/>
      <text:p text:style-name="P7"/>
      <text:p text:style-name="P7"/>
      <text:p text:style-name="P7">Play <text:span text:style-name="T23">it alone <text:s text:c="21"/></text:span></text:p>
      <text:p text:style-name="P7"/>
      <text:p text:style-name="P7"/>
      <text:p text:style-name="P7"/>
      <text:p text:style-name="P17">Play it with more people, <text:span text:style-name="T37">it’s more fun</text:span></text:p>
      <text:p text:style-name="P17"/>
      <text:p text:style-name="P5"/>
      <text:p text:style-name="P5"/>
      <text:p text:style-name="P5"/>
      <text:p text:style-name="P34">HOW TO START</text:p>
      <text:p text:style-name="P5"/>
      <text:p text:style-name="P5"/>
      <text:p text:style-name="P17">LEVEL I: <text:s text:c="4"/>9 <text:s/>Cards <text:s/></text:p>
      <text:p text:style-name="P17"/>
      <text:p text:style-name="P17"/>
      <text:p text:style-name="P17"/>
      <text:p text:style-name="P17">LEVEL II: <text:s/>15 Cards (2 <text:span text:style-name="T37">more triads</text:span>)</text:p>
      <text:p text:style-name="P17"/>
      <text:p text:style-name="P17"/>
      <text:p text:style-name="P17"/>
      <text:p text:style-name="P17"><text:span text:style-name="T24">A. </text:span>Order all the Cards <text:span text:style-name="T37">in groups of 3 (optional)</text:span><text:span text:style-name="T24"> </text:span></text:p>
      <text:p text:style-name="P17"/>
      <text:p text:style-name="P17"/>
      <text:p text:style-name="P18">B. <text:span text:style-name="T37">P</text:span>lay <text:span text:style-name="T37">the</text:span> <text:span text:style-name="T36">G</text:span>ames <text:s/></text:p>
      <text:p text:style-name="P17"/>
      <text:p text:style-name="P17"/>
      <text:p text:style-name="P70"><text:soft-page-break/></text:p>
      <text:p text:style-name="P70">GAMES</text:p>
      <text:p text:style-name="P73"><draw:frame draw:style-name="fr1" draw:name="Imagen2" text:anchor-type="char" svg:x="-0.035cm" svg:y="0.233cm" svg:width="8.315cm" svg:height="3.988cm" draw:z-index="1"><draw:image xlink:href="Pictures/10000000000004000000040009E64F95FCE6C2A6.jpg" xlink:type="simple" xlink:show="embed" xlink:actuate="onLoad" draw:mime-type="image/jpeg"/></draw:frame></text:p>
      <text:p text:style-name="P73"/>
      <text:p text:style-name="P85">VOWS</text:p>
      <text:p text:style-name="P36">(Optional, Advanced)</text:p>
      <text:p text:style-name="P15"/>
      <text:p text:style-name="P15"/>
      <text:p text:style-name="P15"/>
      <text:p text:style-name="P22"><text:s/>Get 1 <text:span text:style-name="T34">C</text:span>ard <text:span text:style-name="T36">(</text:span><text:span text:style-name="T37">r</text:span><text:span text:style-name="T34">andomly, </text:span><text:span text:style-name="T36">etc)</text:span><text:span text:style-name="T34"> </text:span>and <text:span text:style-name="T34">get</text:span> </text:p>
      <text:p text:style-name="P22"/>
      <text:p text:style-name="P14"/>
      <text:p text:style-name="P14"><text:s/></text:p>
      <text:p text:style-name="P30"><text:s/>Abstract <text:s text:c="27"/>Practical</text:p>
      <text:p text:style-name="P14"><text:span text:style-name="T18"><text:s text:c="8"/>V</text:span>ow it for a time <text:s text:c="8"/><text:span text:style-name="T34">Flove.org/</text:span><text:span text:style-name="T16">(write it here)</text:span></text:p>
      <text:p text:style-name="P19"><text:s text:c="16"/></text:p>
      <text:p text:style-name="P28"/>
      <text:p text:style-name="P28"><text:soft-page-break/></text:p>
      <text:p text:style-name="P38">LINKS</text:p>
      <text:p text:style-name="P40"/>
      <text:p text:style-name="P5"><text:span text:style-name="T34">1. Get 1 card &amp; e</text:span>xpress something related <text:span text:style-name="T34">to it</text:span></text:p>
      <text:p text:style-name="P63"/>
      <text:p text:style-name="P80">Not too obvious, not too original</text:p>
      <text:p text:style-name="P5"/>
      <text:p text:style-name="P80"><draw:frame draw:style-name="fr2" draw:name="Imagen3" text:anchor-type="char" svg:width="7.851cm" svg:height="3.103cm" draw:z-index="2"><draw:image xlink:href="Pictures/1000000000000400000003F3A9427053073B3217.jpg" xlink:type="simple" xlink:show="embed" xlink:actuate="onLoad" draw:mime-type="image/jpeg"/></draw:frame></text:p>
      <text:p text:style-name="P25"/>
      <text:p text:style-name="P5"><text:span text:style-name="T34">2. </text:span><text:span text:style-name="T37">Others </text:span><text:span text:style-name="T24">Guess </text:span><text:span text:style-name="T37">the Card and</text:span><text:span text:style-name="T24">or </text:span>Rate the <text:span text:style-name="T24">relation</text:span></text:p>
      <text:p text:style-name="P5"/>
      <text:p text:style-name="P5"/>
      <text:p text:style-name="P5"/>
      <text:p text:style-name="P31">More...</text:p>
      <text:p text:style-name="P26"/>
      <text:p text:style-name="P26">1.1. <text:span text:style-name="T37">Write i</text:span>n the <text:span text:style-name="T37">Cards’ </text:span>back, keep it covered</text:p>
      <text:p text:style-name="P15"/>
      <text:p text:style-name="P26">1.2. Mix them, and try to guess its source word</text:p>
      <text:p text:style-name="P5"/>
      <text:p text:style-name="P5"/>
      <text:p text:style-name="P5"><text:span text:style-name="T35">2.1 </text:span>Ask for custom Links (negatives, <text:span text:style-name="T24">acts...</text:span>)</text:p>
      <text:p text:style-name="P5"/>
      <text:p text:style-name="P35"><draw:frame draw:style-name="fr1" draw:name="Imagen4" text:anchor-type="char" svg:x="5.256cm" svg:y="0.012cm" svg:width="2.99cm" svg:height="1.796cm" draw:z-index="3"><draw:image xlink:href="Pictures/1000000000000400000003F295536796B5E99A77.jpg" xlink:type="simple" xlink:show="embed" xlink:actuate="onLoad" draw:mime-type="image/jpeg"/></draw:frame><text:soft-page-break/></text:p>
      <text:p text:style-name="P38"><text:span text:style-name="T21"><text:s text:c="17"/></text:span>RANKS</text:p>
      <text:p text:style-name="P38"/>
      <text:p text:style-name="P15"><text:span text:style-name="T7"/></text:p>
      <text:p text:style-name="P15"><text:span text:style-name="T7">0. </text:span><text:span text:style-name="T9">Set up</text:span><text:span text:style-name="T26"> </text:span></text:p>
      <text:p text:style-name="P23"/>
      <text:p text:style-name="P23">-<text:span text:style-name="T46">Order the cards in objective groups of 3, or:</text:span></text:p>
      <text:p text:style-name="P23"/>
      <text:p text:style-name="P44"><text:span text:style-name="T26">-</text:span><text:span text:style-name="T37">Give 3 Triads </text:span><text:span text:style-name="T47">(not questions &amp; economy)</text:span><text:span text:style-name="T37"> covered </text:span></text:p>
      <text:p text:style-name="P44"/>
      <text:p text:style-name="P44"><text:span text:style-name="T37">-Order them: Abstract to concrete (optional) </text:span></text:p>
      <text:p text:style-name="P5"/>
      <text:p text:style-name="P5"/>
      <text:p text:style-name="P11"><text:span text:style-name="T7">1. </text:span><text:span text:style-name="T11">Ask to </text:span><text:span text:style-name="T2">Make vertical lists of 3 </text:span><text:span text:style-name="T8">&amp; </text:span><text:span text:style-name="T2">Explain why </text:span></text:p>
      <text:p text:style-name="P8"/>
      <text:p text:style-name="P62"/>
      <text:p text:style-name="P8"/>
      <text:p text:style-name="P11"><text:span text:style-name="T7">2. </text:span><text:span text:style-name="T4">Add Perspectives </text:span><text:span text:style-name="T15">(better with extra Decks)</text:span></text:p>
      <text:p text:style-name="P11"/>
      <text:p text:style-name="P50"><text:span text:style-name="T46">Place</text:span><text:span text:style-name="T37"> </text:span><text:span text:style-name="T46">these </text:span><text:span text:style-name="T28">M</text:span><text:span text:style-name="T25">agic </text:span><text:span text:style-name="T28">C</text:span><text:span text:style-name="T25">ards </text:span><text:span text:style-name="T28">along your play</text:span><text:span text:style-name="T46">s:</text:span></text:p>
      <text:p text:style-name="P62"/>
      <text:p text:style-name="P62">SUBJECTIVE-OBJECTIVE &amp; MOMENTUAL-GENERAL</text:p>
      <text:p text:style-name="P11"><text:span text:style-name="T28"><text:s/></text:span></text:p>
      <text:p text:style-name="P11"/>
      <text:p text:style-name="P27"/>
      <text:p text:style-name="P27"><text:span text:style-name="T31">3. </text:span><text:span text:style-name="T26">Contrast Perspectives &amp; </text:span>Relate 1s, 2s and 3s</text:p>
      <text:p text:style-name="P71"/>
      <text:p text:style-name="P71"/>
      <text:p text:style-name="P71"/>
      <text:p text:style-name="P12"><text:span text:style-name="T30">4. </text:span><text:span text:style-name="T29">LEVEL II:</text:span><text:span text:style-name="T7">Add the Economy &amp; Questions triads</text:span></text:p>
      <text:p text:style-name="P8"/>
      <text:p text:style-name="P8"><text:soft-page-break/></text:p>
      <text:p text:style-name="P29"/>
      <text:p text:style-name="P86">ADVANCED RANKS</text:p>
      <text:p text:style-name="P64"/>
      <text:p text:style-name="P64"/>
      <text:p text:style-name="P9"><text:span text:style-name="T2">LEVEL </text:span><text:span text:style-name="T4">I</text:span><text:span text:style-name="T2">II</text:span>: <text:span text:style-name="T2">BIOLOGY</text:span>: 4x5s &amp; 2x5 plus 1</text:p>
      <text:p text:style-name="P9"/>
      <text:p text:style-name="P9">-<text:span text:style-name="T31">Order the </text:span><text:span text:style-name="T25">5 </text:span><text:span text:style-name="T31">S</text:span><text:span text:style-name="T25">enses as square vertexes &amp; center</text:span></text:p>
      <text:p text:style-name="P9"/>
      <text:p text:style-name="P9">-<text:span text:style-name="T37">Do the same with the 5 Elements &amp; explain Why </text:span></text:p>
      <text:p text:style-name="P9"/>
      <text:p text:style-name="P20"/>
      <text:p text:style-name="P20"/>
      <text:p text:style-name="P20">-<text:span text:style-name="T31">Order </text:span>5 <text:span text:style-name="T31">linear </text:span>pairs of Systems <text:span text:style-name="T31">with</text:span> centro<text:span text:style-name="T31">id</text:span></text:p>
      <text:p text:style-name="P9"/>
      <text:p text:style-name="P74">Choose easier pairs first, then centroid, then the rest… </text:p>
      <text:p text:style-name="P56"/>
      <text:p text:style-name="P56">-Order the Systems pairs from micro to macro</text:p>
      <text:p text:style-name="P9"/>
      <text:p text:style-name="P9"/>
      <text:p text:style-name="P9"/>
      <text:p text:style-name="P9">-<text:span text:style-name="T38">Order</text:span><text:span text:style-name="T31"> </text:span><text:span text:style-name="T25">5 senses </text:span><text:span text:style-name="T38">in</text:span><text:span text:style-name="T25"> </text:span><text:span text:style-name="T38">line with</text:span><text:span text:style-name="T25"> </text:span><text:span text:style-name="T31">the </text:span><text:span text:style-name="T25">5 systems pairs</text:span></text:p>
      <text:p text:style-name="P74"/>
      <text:p text:style-name="P74">The inner part o that sense represents that system’s pair</text:p>
      <text:p text:style-name="P9"/>
      <text:p text:style-name="P9"/>
      <text:p text:style-name="P9"/>
      <text:p text:style-name="P9"/>
      <text:p text:style-name="P5"><text:span text:style-name="T2">LEVEL I</text:span><text:span text:style-name="T4">V</text:span>:<text:span text:style-name="T2"> META</text:span><text:span text:style-name="T4">PHYSICS</text:span><text:span text:style-name="T2">, SCIENCES &amp; PS</text:span><text:span text:style-name="T10">Y</text:span><text:span text:style-name="T2">CO</text:span><text:span text:style-name="T9">SOCIAL</text:span></text:p>
      <text:p text:style-name="P5"/>
      <text:p text:style-name="P5">-<text:span text:style-name="T39">Make related groups of 2,3 and 4 &amp; Explain why</text:span></text:p>
      <text:p text:style-name="P5"/>
      <text:p text:style-name="P5"/>
      <text:p text:style-name="P5"><text:soft-page-break/></text:p>
      <text:p text:style-name="P5"/>
      <text:p text:style-name="P81"><text:span text:style-name="T12">MAGICAL CARDS</text:span></text:p>
      <text:p text:style-name="P46"><text:span text:style-name="T12"/></text:p>
      <text:p text:style-name="P46"><text:span text:style-name="T9"/></text:p>
      <text:p text:style-name="P69"><text:span text:style-name="T41">S</text:span>UBJECTIVE-OBJECTIVE &amp; MOMENTUAL-GENERAL:</text:p>
      <text:p text:style-name="P69"/>
      <text:p text:style-name="P78">Default perspective is subjective &amp; momentual, but suggest to refocus that and try to get into the General Objective one, for having richer debates. It’s very useful to use extra decks for contrasting these perspectives.</text:p>
      <text:p text:style-name="P46"><text:span text:style-name="T9"/></text:p>
      <text:p text:style-name="P46"><text:span text:style-name="T9"/></text:p>
      <text:p text:style-name="P46"><text:span text:style-name="T9"/></text:p>
      <text:p text:style-name="P57">TIMES &amp; SPACES: <text:span text:style-name="T40">Know </text:span>Linear<text:span text:style-name="T40">ity</text:span> and Confluence</text:p>
      <text:p text:style-name="P5"/>
      <text:p text:style-name="P75">Play objectivity by ordering Times linearly &amp; see a Confluence in the middle – second with Spaces. A<text:span text:style-name="T42">lso objectiviz</text:span>e the Times Triad with the Questions one.</text:p>
      <text:p text:style-name="P5"/>
      <text:p text:style-name="P5"/>
      <text:p text:style-name="P5"/>
      <text:p text:style-name="P57">TAO-YIN-YANG: Know Confluence and Gender where</text:p>
      <text:p text:style-name="P5"/>
      <text:p text:style-name="P75">Wherever you place TAO is where you tend to <text:s/>position Confluence subjectively and when you place i.e. Yin in the second, it would mean all other seconds are your femenine side within there.</text:p>
      <text:p text:style-name="P5"/>
      <text:p text:style-name="P5"/>
      <text:p text:style-name="P5"/>
      <text:p text:style-name="P58">SYMBOLS: Know Confluence and Cycle more close</text:p>
      <text:p text:style-name="P5"/>
      <text:p text:style-name="P5"/>
      <text:p text:style-name="P82"><text:soft-page-break/></text:p>
      <text:p text:style-name="P38">SOULS</text:p>
      <text:p text:style-name="P5"><draw:frame draw:style-name="fr1" draw:name="Imagen5" text:anchor-type="char" svg:x="0cm" svg:y="0.032cm" svg:width="8.297cm" svg:height="2.745cm" draw:z-index="4"><draw:image xlink:href="Pictures/1000000000000400000002887F16C76F92F6B833.jpg" xlink:type="simple" xlink:show="embed" xlink:actuate="onLoad" draw:mime-type="image/jpeg"/></draw:frame></text:p>
      <text:p text:style-name="P10"><text:span text:style-name="T26">1. ADD</text:span> an </text:p>
      <text:p text:style-name="P32"/>
      <text:p text:style-name="P21"><text:span text:style-name="T5">A</text:span><text:span text:style-name="T2">nimal <text:s text:c="13"/></text:span><text:span text:style-name="T6">&amp; <text:s text:c="11"/></text:span><text:span text:style-name="T2"><text:s/></text:span><text:span text:style-name="T5">C</text:span><text:span text:style-name="T2">olour</text:span></text:p>
      <text:p text:style-name="P21"/>
      <text:p text:style-name="P5"/>
      <text:p text:style-name="P23">2. ADD</text:p>
      <text:p text:style-name="P54"><text:s text:c="3"/>3 <text:span text:style-name="T1">A</text:span>djectives of each <text:s/></text:p>
      <text:p text:style-name="P54"><text:s text:c="3"/></text:p>
      <text:p text:style-name="P21">- <text:s text:c="34"/>-</text:p>
      <text:p text:style-name="P21"/>
      <text:p text:style-name="P21">- <text:s text:c="34"/>-</text:p>
      <text:p text:style-name="P21"/>
      <text:p text:style-name="P21">- <text:s text:c="34"/>-</text:p>
      <text:p text:style-name="P24">[OFFERS <text:s text:c="22"/>WANTS]</text:p>
      <text:p text:style-name="P24"/>
      <text:p text:style-name="P16"><text:span text:style-name="T32"><text:s/>[</text:span>1 <text:span text:style-name="T22">AM, </text:span>2 <text:span text:style-name="T22">GET, </text:span>3 PRO<text:span text:style-name="T22">J</text:span>ECT<text:span text:style-name="T32">]</text:span></text:p>
      <text:p text:style-name="P5"/>
      <text:p text:style-name="P5"><text:span text:style-name="T26">3. </text:span><text:span text:style-name="T32">A</text:span>dd <text:span text:style-name="T26">an </text:span>older <text:span text:style-name="T1">A</text:span>ncestor &amp; <text:span text:style-name="T1">S</text:span>ense &amp; 3 <text:span text:style-name="T1">A</text:span>djectives</text:p>
      <text:p text:style-name="P77">Use the popular matters and species taxonomy for Ancestors and the Biology cards for ancestor Senses-Channels</text:p>
      <text:p text:style-name="P83"><text:soft-page-break/></text:p>
      <text:p text:style-name="P39">M<text:span text:style-name="T42">ore</text:span> hints</text:p>
      <text:p text:style-name="P6"/>
      <text:p text:style-name="P60"><text:span text:style-name="T13">VOW</text:span><text:span text:style-name="T3">S: </text:span><text:span text:style-name="T44">What if i don’t do it after?</text:span></text:p>
      <text:p text:style-name="P76"><text:span text:style-name="T44">I</text:span><text:span text:style-name="T43">t’s up to you and your Karma</text:span></text:p>
      <text:p text:style-name="P6"><text:span text:style-name="T3"/></text:p>
      <text:p text:style-name="P6"><text:span text:style-name="T3"/></text:p>
      <text:p text:style-name="P6"><text:span text:style-name="T3">LINKS</text:span><text:span text:style-name="T20">: </text:span><text:span text:style-name="T22">Words related because of what logic?</text:span></text:p>
      <text:p text:style-name="P76">Provide a reasonable traceability and a novel insight</text:p>
      <text:p text:style-name="P6"/>
      <text:p text:style-name="P6"/>
      <text:p text:style-name="P59"><text:span text:style-name="T2">RA</text:span><text:span text:style-name="T3">NKS</text:span>: <text:span text:style-name="T22">Order them vertically because of what?</text:span></text:p>
      <text:p text:style-name="P76">Subjective momentum, try after general &amp; objective</text:p>
      <text:p text:style-name="P65"/>
      <text:p text:style-name="P65"/>
      <text:p text:style-name="P66"><text:span text:style-name="T42">SOULS</text:span>: <text:span text:style-name="T44">What if i troll the replies</text:span><text:span text:style-name="T45">?</text:span></text:p>
      <text:p text:style-name="P79"><text:span text:style-name="T45">A</text:span><text:span text:style-name="T43">ll outerly expressed comes from and reveals an inner side of oneself. By trolling SOULS one might think is hiding its inner, but that gives a more potential richer link and in betweens, altough it might be a bit harder to clarify.</text:span></text:p>
      <text:p text:style-name="P66"><text:span text:style-name="T45"/></text:p>
      <text:p text:style-name="P66"><text:span text:style-name="T45"/></text:p>
      <text:p text:style-name="P72"><text:span text:style-name="T22">MORE </text:span><text:span text:style-name="T27">tricks</text:span></text:p>
      <text:p text:style-name="P65"/>
      <text:p text:style-name="P6"><text:span text:style-name="T32">R</text:span><text:span text:style-name="T22">ecord the games, PROSODY </text:span><text:span text:style-name="T32">is more key than word</text:span><text:span text:style-name="T33">s</text:span></text:p>
      <text:p text:style-name="P13"/>
      <text:p text:style-name="P13"><text:span text:style-name="T18">Define by (accumulatuve) images, gestures...</text:span></text:p>
      <text:p text:style-name="P13"><text:span text:style-name="T27">C</text:span><text:span text:style-name="T1">ouple </text:span><text:span text:style-name="T27">cards &amp; define them with wise.flove.org</text:span></text:p>
      <text:p text:style-name="P13"><text:span text:style-name="T31">Gamify it</text:span><text:span text:style-name="T28">: </text:span><text:span text:style-name="T18">G</text:span><text:span text:style-name="T1">ive points </text:span><text:span text:style-name="T27">&amp;</text:span><text:span text:style-name="T1"> </text:span><text:span text:style-name="T27">G</text:span><text:span text:style-name="T18">et</text:span><text:span text:style-name="T1"> </text:span><text:span text:style-name="T27">A</text:span><text:span text:style-name="T18">nalysis </text:span><text:span text:style-name="T31">(&amp; decks)</text:span></text:p>
      <text:p text:style-name="P13"><text:span text:style-name="T31">Share: Gift the deck &amp; Sell a pack for friend</text:span><text:span text:style-name="T42">s</text:span></text:p>
      <text:p text:style-name="P61"/>
      <text:p text:style-name="P61"><text:span text:style-name="T27">Play again, </text:span><text:span text:style-name="T46">c</text:span><text:span text:style-name="T19">ontrast</text:span> <text:span text:style-name="T19">the plays, </text:span><text:span text:style-name="T46">share results</text:span></text:p>
      <text:p text:style-name="P13"><text:span text:style-name="T27">Create triads </text:span><text:span text:style-name="T46">and</text:span><text:span text:style-name="T27"> Invent new</text:span> rul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Typewriter" svg:font-family="MathJax_Typewriter" style:font-family-generic="moder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Spotted_20_Gray" draw:display-name="Spotted Gray" draw:style="radial" draw:cx="50%" draw:cy="50%" draw:start-color="#b2b2b2" draw:end-color="#eeeeee" draw:start-intensity="100%" draw:end-intensity="100%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gradient" draw:fill-gradient-name="Spotted_20_Gray" draw:gradient-step-count="0"/>
      <style:paragraph-properties style:page-number="auto" fo:background-color="#d0d0d0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2cm" fo:margin-bottom="2cm" fo:margin-left="1.127cm" fo:margin-right="1.07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6:30:02.620791934</meta:creation-date>
    <dc:date>2025-10-11T13:04:56.494013163</dc:date>
    <meta:editing-duration>PT1H53M57S</meta:editing-duration>
    <meta:editing-cycles>20</meta:editing-cycles>
    <meta:generator>LibreOffice/7.3.7.2$Linux_X86_64 LibreOffice_project/30$Build-2</meta:generator>
    <meta:document-statistic meta:table-count="0" meta:image-count="5" meta:object-count="0" meta:page-count="9" meta:paragraph-count="92" meta:word-count="622" meta:character-count="3796" meta:non-whitespace-character-count="2967"/>
  </office:meta>
</office:document-meta>
</file>